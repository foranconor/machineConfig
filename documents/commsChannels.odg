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F0000007972B7556D.png" manifest:media-type="image/png"/>
  <manifest:file-entry manifest:full-path="Pictures/2000004A0000051A000009FCCDCC40CF.svm" manifest:media-type="image/x-svm"/>
  <manifest:file-entry manifest:full-path="Pictures/100000010000014000000070DC304625.png" manifest:media-type="image/png"/>
  <manifest:file-entry manifest:full-path="Pictures/100000000000003200000062583B58A4.png" manifest:media-type="image/png"/>
  <manifest:file-entry manifest:full-path="Pictures/1000000100000335000001C925A5BA0C.png" manifest:media-type="image/png"/>
  <manifest:file-entry manifest:full-path="Pictures/10000000000000A80000006BC105F0FB.png" manifest:media-type="image/png"/>
  <manifest:file-entry manifest:full-path="Pictures/200000EE0000114E00000AF60513C8A3.svm" manifest:media-type="image/x-svm"/>
  <manifest:file-entry manifest:full-path="Pictures/100000010000015F00000448AD972072.png" manifest:media-type="image/png"/>
  <manifest:file-entry manifest:full-path="Pictures/10000001000000CA000000DDBF5D9AA7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335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ff8000" draw:marker-start="Arrow" draw:marker-start-width="0.3cm" draw:marker-end="Arrow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5eb91e" draw:marker-start="Arrow" draw:marker-start-width="0.3cm" draw:marker-end="Arrow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5983b0" draw:marker-start="Arrow" draw:marker-start-width="0.3cm" draw:marker-end="Arrow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a1467e" draw:marker-start="Arrow" draw:marker-start-width="0.3cm" draw:marker-end="Arrow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5.344cm" svg:height="5.846cm" svg:x="4.406cm" svg:y="22.654cm">
          <draw:image xlink:href="Pictures/10000001000000CA000000DDBF5D9AA7.png" xlink:type="simple" xlink:show="embed" xlink:actuate="onLoad" draw:mime-type="image/png">
            <text:p/>
          </draw:image>
        </draw:frame>
        <draw:frame draw:style-name="gr2" draw:text-style-name="P1" xml:id="id2" draw:id="id2" draw:layer="layout" svg:width="2.242cm" svg:height="7cm" svg:x="12.508cm" svg:y="20.25cm">
          <draw:image xlink:href="Pictures/100000010000015F00000448AD972072.png" xlink:type="simple" xlink:show="embed" xlink:actuate="onLoad" draw:mime-type="image/png">
            <text:p/>
          </draw:image>
        </draw:frame>
        <draw:frame draw:style-name="gr2" draw:text-style-name="P1" xml:id="id1" draw:id="id1" draw:layer="layout" svg:width="8.171cm" svg:height="4.547cm" draw:transform="rotate (-1.5707963267949) translate (8.797cm 10.079cm)">
          <draw:image xlink:href="Pictures/1000000100000335000001C925A5BA0C.png" xlink:type="simple" xlink:show="embed" xlink:actuate="onLoad" draw:mime-type="image/png">
            <text:p/>
          </draw:image>
        </draw:frame>
        <draw:frame draw:style-name="gr2" draw:text-style-name="P1" xml:id="id6" draw:id="id6" draw:layer="layout" svg:width="4.418cm" svg:height="2.804cm" svg:x="14cm" svg:y="13.5cm">
          <draw:image xlink:href="Pictures/200000EE0000114E00000AF60513C8A3.svm" xlink:type="simple" xlink:show="embed" xlink:actuate="onLoad" draw:mime-type="image/x-svm">
            <text:p/>
          </draw:image>
          <draw:image xlink:href="Pictures/10000000000000A80000006BC105F0FB.png" xlink:type="simple" xlink:show="embed" xlink:actuate="onLoad" draw:mime-type="image/png"/>
        </draw:frame>
        <draw:frame draw:style-name="gr2" draw:text-style-name="P1" xml:id="id8" draw:id="id8" draw:layer="layout" svg:width="1.295cm" svg:height="2.565cm" svg:x="17.455cm" svg:y="3.685cm">
          <draw:image xlink:href="Pictures/2000004A0000051A000009FCCDCC40CF.svm" xlink:type="simple" xlink:show="embed" xlink:actuate="onLoad" draw:mime-type="image/x-svm">
            <text:p/>
          </draw:image>
          <draw:image xlink:href="Pictures/100000000000003200000062583B58A4.png" xlink:type="simple" xlink:show="embed" xlink:actuate="onLoad" draw:mime-type="image/png"/>
        </draw:frame>
        <draw:g draw:name="wireless-access-point" draw:style-name="gr3" xml:id="id7" draw:id="id7">
          <draw:line draw:style-name="gr4" draw:text-style-name="P2" draw:layer="layout" svg:x1="17.25cm" svg:y1="8.828cm" svg:x2="17.25cm" svg:y2="9.128cm">
            <text:p/>
          </draw:line>
          <draw:custom-shape draw:style-name="gr5" draw:text-style-name="P3" draw:layer="layout" svg:width="0.5cm" svg:height="1.253cm" svg:x="17cm" svg:y="8.996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ellipse draw:style-name="gr6" draw:text-style-name="P4" draw:layer="layout" svg:width="0.5cm" svg:height="0.502cm" svg:x="17cm" svg:y="8.467cm" draw:kind="arc" draw:start-angle="326.77" draw:end-angle="32.36">
            <text:p/>
          </draw:ellipse>
          <draw:ellipse draw:style-name="gr7" draw:text-style-name="P5" draw:layer="layout" svg:width="0.5cm" svg:height="0.502cm" svg:x="17cm" svg:y="8.467cm" draw:kind="arc" draw:start-angle="147.58" draw:end-angle="213.24">
            <text:p/>
          </draw:ellipse>
          <draw:ellipse draw:style-name="gr8" draw:text-style-name="P4" draw:layer="layout" svg:width="0.75cm" svg:height="0.752cm" svg:x="16.875cm" svg:y="8.333cm" draw:kind="arc" draw:start-angle="326.77" draw:end-angle="32.36">
            <text:p/>
          </draw:ellipse>
          <draw:ellipse draw:style-name="gr9" draw:text-style-name="P5" draw:layer="layout" svg:width="0.75cm" svg:height="0.752cm" svg:x="16.875cm" svg:y="8.333cm" draw:kind="arc" draw:start-angle="147.58" draw:end-angle="213.24">
            <text:p/>
          </draw:ellipse>
          <draw:ellipse draw:style-name="gr10" draw:text-style-name="P4" draw:layer="layout" svg:width="1.125cm" svg:height="1.128cm" svg:x="16.625cm" svg:y="8.136cm" draw:kind="arc" draw:start-angle="326.77" draw:end-angle="32.36">
            <text:p/>
          </draw:ellipse>
          <draw:ellipse draw:style-name="gr11" draw:text-style-name="P5" draw:layer="layout" svg:width="1.125cm" svg:height="1.128cm" svg:x="16.75cm" svg:y="8.136cm" draw:kind="arc" draw:start-angle="147.63" draw:end-angle="213.21">
            <text:p/>
          </draw:ellipse>
          <draw:ellipse draw:style-name="gr12" draw:text-style-name="P6" draw:layer="layout" svg:width="0.25cm" svg:height="0.251cm" svg:x="17.125cm" svg:y="8.583cm">
            <text:p/>
          </draw:ellipse>
        </draw:g>
        <draw:connector draw:style-name="gr13" draw:text-style-name="P7" draw:layer="layout" draw:type="curve" svg:x1="6.524cm" svg:y1="18.25cm" svg:x2="13.629cm" svg:y2="20.25cm" draw:start-shape="id1" draw:end-shape="id2" svg:d="M6524 18250c0 1500 7105 500 7105 2000" svg:viewBox="0 0 7106 2001">
          <text:p/>
        </draw:connector>
        <draw:connector draw:style-name="gr13" draw:text-style-name="P7" draw:layer="layout" draw:type="curve" svg:x1="6.524cm" svg:y1="18.25cm" svg:x2="7.078cm" svg:y2="22.654cm" draw:start-shape="id1" draw:end-shape="id3" svg:d="M6524 18250c0 3303 554 1101 554 4404" svg:viewBox="0 0 555 4405">
          <text:p/>
        </draw:connector>
        <draw:frame draw:style-name="gr2" draw:text-style-name="P1" xml:id="id4" draw:id="id4" draw:layer="layout" svg:width="8.466cm" svg:height="2.75cm" draw:transform="rotate (-1.5707963267949) translate (3.75cm 20.234cm)">
          <draw:image xlink:href="Pictures/100000010000014000000070DC304625.png" xlink:type="simple" xlink:show="embed" xlink:actuate="onLoad" draw:mime-type="image/png">
            <text:p/>
          </draw:image>
        </draw:frame>
        <draw:connector draw:style-name="gr13" draw:text-style-name="P7" draw:layer="layout" draw:type="curve" svg:x1="6.524cm" svg:y1="18.25cm" svg:x2="2.375cm" svg:y2="20.234cm" draw:start-shape="id1" draw:end-shape="id4" svg:d="M6524 18250c0 1488-4149 496-4149 1984" svg:viewBox="0 0 4150 1985">
          <text:p/>
        </draw:connector>
        <draw:frame draw:style-name="gr2" draw:text-style-name="P1" xml:id="id5" draw:id="id5" draw:layer="layout" svg:width="4.483cm" svg:height="1.7cm" svg:x="11.517cm" svg:y="3.05cm">
          <draw:image xlink:href="Pictures/100000010000013F0000007972B7556D.png" xlink:type="simple" xlink:show="embed" xlink:actuate="onLoad" draw:mime-type="image/png">
            <text:p/>
          </draw:image>
        </draw:frame>
        <draw:connector draw:style-name="gr14" draw:text-style-name="P7" draw:layer="layout" draw:type="curve" svg:x1="13.758cm" svg:y1="4.75cm" svg:x2="6.524cm" svg:y2="10.079cm" draw:start-shape="id5" draw:end-shape="id1" svg:d="M13758 4750c0 3997-7234 1333-7234 5329" svg:viewBox="0 0 7235 5330">
          <text:p/>
        </draw:connector>
        <draw:connector draw:style-name="gr15" draw:text-style-name="P7" draw:layer="layout" draw:type="curve" svg:x1="16.209cm" svg:y1="16.304cm" svg:x2="13.629cm" svg:y2="20.25cm" draw:start-shape="id6" draw:end-shape="id2" svg:d="M16209 16304c0 2959-2580 987-2580 3946" svg:viewBox="0 0 2581 3947">
          <text:p/>
        </draw:connector>
        <draw:connector draw:style-name="gr16" draw:text-style-name="P7" draw:layer="layout" draw:type="curve" svg:x1="14cm" svg:y1="14.902cm" svg:x2="8.797cm" svg:y2="14.164cm" draw:start-shape="id6" draw:start-glue-point="3" draw:end-shape="id1" svg:d="M14000 14902c-3901 0-1300-738-5203-738" svg:viewBox="0 0 5204 739">
          <text:p/>
        </draw:connector>
        <draw:connector draw:style-name="gr17" draw:text-style-name="P7" draw:layer="layout" draw:type="curve" svg:x1="16.209cm" svg:y1="13.5cm" svg:x2="17.25cm" svg:y2="10.25cm" draw:start-shape="id6" draw:end-shape="id7" draw:end-glue-point="2" svg:d="M16209 13500c0-2416 1041-792 1041-3250" svg:viewBox="0 0 1042 3251">
          <text:p/>
        </draw:connector>
        <draw:connector draw:style-name="gr17" draw:text-style-name="P7" draw:layer="layout" draw:type="curve" svg:x1="17.25cm" svg:y1="8.398cm" svg:x2="18.102cm" svg:y2="6.25cm" draw:start-shape="id7" draw:end-shape="id8" draw:end-glue-point="2" svg:d="M17250 8398c0-1630 852-557 852-2148" svg:viewBox="0 0 853 2149">
          <text:p/>
        </draw:connector>
        <draw:frame draw:style-name="gr18" draw:text-style-name="P8" draw:layer="layout" svg:width="3.5cm" svg:height="1.25cm" svg:x="9.75cm" svg:y="7.5cm">
          <draw:text-box>
            <text:p>RS458</text:p>
          </draw:text-box>
        </draw:frame>
        <draw:frame draw:style-name="gr19" draw:text-style-name="P8" draw:layer="layout" svg:width="2.25cm" svg:height="1cm" svg:x="7.25cm" svg:y="19.75cm">
          <draw:text-box>
            <text:p>24vdc</text:p>
          </draw:text-box>
        </draw:frame>
        <draw:frame draw:style-name="gr20" draw:text-style-name="P8" draw:layer="layout" svg:width="2.867cm" svg:height="0.962cm" svg:x="15.25cm" svg:y="18.288cm">
          <draw:text-box>
            <text:p>Ethercat</text:p>
          </draw:text-box>
        </draw:frame>
        <draw:frame draw:style-name="gr20" draw:text-style-name="P8" draw:layer="layout" svg:width="1.808cm" svg:height="0.962cm" svg:x="11.192cm" svg:y="13.25cm">
          <draw:text-box>
            <text:p>USB</text:p>
          </draw:text-box>
        </draw:frame>
        <draw:frame draw:style-name="gr20" draw:text-style-name="P8" draw:layer="layout" svg:width="1.56cm" svg:height="0.962cm" svg:x="17.94cm" svg:y="8.788cm">
          <draw:text-box>
            <text:p>Wifi</text:p>
          </draw:text-box>
        </draw:frame>
        <draw:frame draw:style-name="gr20" draw:text-style-name="P8" draw:layer="layout" svg:width="11.902cm" svg:height="0.962cm" svg:x="1.25cm" svg:y="1.288cm">
          <draw:text-box>
            <text:p>CNC Machine Communication Channel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ffde59" draw:marker-start="Circle" draw:marker-start-width="0.35cm" draw:marker-start-center="true" draw:marker-end="Circle" draw:marker-end-width="0.35cm" draw:marker-end-center="true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3T19:58:13.294105434</meta:creation-date>
    <dc:date>2026-05-16T11:01:40.273954801</dc:date>
    <meta:editing-duration>PT21H16M18S</meta:editing-duration>
    <meta:editing-cycles>1</meta:editing-cycles>
    <meta:document-statistic meta:object-count="31"/>
    <meta:generator>LibreOffice/26.2.2.2$Linux_X86_64 LibreOffice_project/620$Build-2</meta:generator>
  </office:meta>
</office:document-meta>
</file>